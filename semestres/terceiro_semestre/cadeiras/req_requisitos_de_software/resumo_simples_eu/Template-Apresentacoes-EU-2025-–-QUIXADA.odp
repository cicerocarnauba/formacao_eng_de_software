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BB800000698164C8167574B1DA9.png" manifest:media-type="image/png"/>
  <manifest:file-entry manifest:full-path="Pictures/100000010000078000000438F245A529C6BD3B26.png" manifest:media-type="image/png"/>
  <manifest:file-entry manifest:full-path="Pictures/1000000100000BB8000006981881EE40D9212CE7.png" manifest:media-type="image/png"/>
  <manifest:file-entry manifest:full-path="Pictures/1000000100000BB800000698B238A397A1DCAF93.png" manifest:media-type="image/png"/>
  <manifest:file-entry manifest:full-path="Pictures/1000000100000780000004382183BBE62FCDCF2A.png" manifest:media-type="image/png"/>
  <manifest:file-entry manifest:full-path="Pictures/1000000100000780000004380C5CBCB8DC508212.png" manifest:media-type="image/png"/>
  <manifest:file-entry manifest:full-path="Pictures/10000000000004380000043877BFC3651FDFF5D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 style:font-pitch="variable"/>
    <style:font-face style:name="Inter ExtraBold" svg:font-family="'Inter ExtraBold'" style:font-pitch="variable"/>
    <style:font-face style:name="Inter ExtraBold1" svg:font-family="'Inter ExtraBold'"/>
    <style:font-face style:name="Inter Light" svg:font-family="'Inter Light'"/>
    <style:font-face style:name="Inter Light1" svg:font-family="'Inter Light'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U2025_25_20-_25_20ID_25_20Visual_25_20templates_25_20apresentações-3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EU2025_25_20-_25_20ID_25_20Visual_25_20templates_25_20apresentações-36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EU2025_25_20-_25_20ID_25_20Visual_25_20templates_25_20apresentações-37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632cm" fo:min-width="14.889cm" fo:padding-top="0cm" fo:padding-bottom="0.254cm" fo:padding-left="0cm" fo:padding-right="0.254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062cm" fo:min-width="11.255cm" fo:padding-top="0cm" fo:padding-bottom="0.254cm" fo:padding-left="0cm" fo:padding-right="0.254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18cm" fo:min-width="11.309cm" fo:padding-top="0cm" fo:padding-bottom="0.254cm" fo:padding-left="0cm" fo:padding-right="0.254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123cm" fo:min-width="9.329cm" fo:padding-top="0cm" fo:padding-bottom="0.254cm" fo:padding-left="0cm" fo:padding-right="0.254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18cm" fo:min-width="8.686cm" fo:padding-top="0cm" fo:padding-bottom="0.254cm" fo:padding-left="0cm" fo:padding-right="0.254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155cm" fo:min-width="11.203cm" fo:padding-top="0cm" fo:padding-bottom="0.254cm" fo:padding-left="0cm" fo:padding-right="0.254cm" fo:wrap-option="wrap" loext:decorative="false"/>
      <style:paragraph-properties style:writing-mode="lr-tb"/>
    </style:style>
    <style:style style:name="gr8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91cm" fo:min-width="8.686cm" fo:padding-top="0cm" fo:padding-bottom="0.254cm" fo:padding-left="0cm" fo:padding-right="0.254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19cm" fo:min-width="14.889cm" fo:padding-top="0cm" fo:padding-bottom="0.254cm" fo:padding-left="0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ExtraBold1" fo:font-size="38pt" fo:letter-spacing="normal" fo:language="pt" fo:country="BR" fo:font-style="normal" style:text-underline-style="none" fo:font-weight="normal" fo:background-color="transparent" style:font-name-asian="Inter ExtraBold1" style:font-size-asian="38pt" style:font-style-asian="normal" style:font-weight-asian="normal" style:font-name-complex="Inter ExtraBold1" style:font-size-complex="3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Light" fo:font-size="15pt" fo:letter-spacing="normal" fo:language="pt" fo:country="BR" fo:font-style="normal" style:text-underline-style="none" fo:font-weight="normal" fo:background-color="transparent" style:font-name-asian="Inter Light" style:font-size-asian="15pt" style:font-style-asian="normal" style:font-weight-asian="normal" style:font-name-complex="Inter Light" style:font-size-complex="15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1" fo:font-size="24pt" fo:letter-spacing="normal" fo:language="pt" fo:country="BR" fo:font-style="normal" style:text-underline-style="none" fo:font-weight="bold" fo:background-color="transparent" style:font-name-asian="Inter1" style:font-size-asian="24pt" style:font-style-asian="normal" style:font-weight-asian="bold" style:font-name-complex="Inter1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1" fo:font-size="24pt" fo:letter-spacing="normal" fo:language="pt" fo:country="BR" fo:font-style="italic" style:text-underline-style="none" fo:font-weight="bold" fo:background-color="transparent" style:font-name-asian="Inter1" style:font-size-asian="24pt" style:font-style-asian="italic" style:font-weight-asian="bold" style:font-name-complex="Inter1" style:font-size-complex="24pt" style:font-style-complex="italic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1" fo:font-size="10pt" fo:letter-spacing="normal" fo:language="pt" fo:country="BR" fo:font-style="normal" style:text-underline-style="none" fo:font-weight="normal" fo:background-color="transparent" style:font-name-asian="Inter1" style:font-size-asian="10pt" style:font-style-asian="normal" style:font-weight-asian="normal" style:font-name-complex="Inter1" style:font-size-complex="1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1" fo:font-size="10pt" fo:letter-spacing="normal" fo:language="pt" fo:country="BR" fo:font-style="normal" style:text-underline-style="solid" style:text-underline-width="auto" style:text-underline-color="font-color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cm" text:min-label-width="0.9cm"/>
        <style:text-properties style:font-name="Inter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5.142cm" svg:height="6.885cm" svg:x="1.094cm" svg:y="0.995cm">
          <text:p text:style-name="P1"><text:span text:style-name="T1">Título da</text:span></text:p>
          <text:p text:style-name="P1"><text:span text:style-name="T1">a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1:notes" draw:style-name="gr2" draw:layer="layout" svg:width="16.933cm" svg:height="9.524cm" svg:x="1.059cm" svg:y="1.905cm" draw:page-number="1" presentation:class="page"/>
          <draw:frame draw:name="Google Shape;52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59;p14" draw:style-name="gr3" draw:text-style-name="P2" draw:layer="layout" svg:width="11.508cm" svg:height="6.315cm" svg:x="0.849cm" svg:y="7.039cm">
          <text:p text:style-name="P1"><text:span text:style-name="T2">Este template foi desenvolvido para auxiliar os participantes dos Encontros Universitários da UFC na criação de apresentações visuais de seus trabalhos acadêmicos. Ele segue o padrão com a identidade visual do evento, garantindo uniformidade na apresentação dos projetos. O objetivo é proporcionar uma experiência clara e visualmente agradável para o público, facilitando a comunicação dos projetos e discussõ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4" draw:text-style-name="P2" draw:layer="layout" svg:width="11.562cm" svg:height="1.971cm" svg:x="0.795cm" svg:y="2.607cm">
          <text:p text:style-name="P1"><text:span text:style-name="T3">Guia para uso do </text:span><text:span text:style-name="T4">template </text:span><text:span text:style-name="T3">de apresent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5" draw:text-style-name="P2" draw:layer="layout" svg:width="9.582cm" svg:height="2.376cm" svg:x="15.066cm" svg:y="11.082cm">
          <text:p text:style-name="P1"><text:span text:style-name="T5">Os textos inseridos no template podem ser facilmente substituídos pelo conteúdo da sua apresentação, mantendo o padrão de formatação e estilo propostos. Assim, você economiza tempo e assegura uma apresentação visualmente coes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2:notes" draw:style-name="gr2" draw:layer="layout" svg:width="16.932cm" svg:height="9.524cm" svg:x="1.059cm" svg:y="1.905cm" draw:page-number="2" presentation:class="page"/>
          <draw:frame draw:name="Google Shape;57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custom-shape draw:name="Google Shape;66;p15" draw:style-name="gr6" draw:text-style-name="P2" draw:layer="layout" svg:width="8.939cm" svg:height="1.971cm" svg:x="0.795cm" svg:y="2.607cm">
          <text:p text:style-name="P1"><text:span text:style-name="T3">Dicas para uma</text:span></text:p>
          <text:p text:style-name="P1"><text:span text:style-name="T3">boa a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7" draw:text-style-name="P5" draw:layer="layout" svg:width="11.456cm" svg:height="4.408cm" svg:x="0.849cm" svg:y="8.841cm">
          <text:list text:style-name="L5">
            <text:list-item>
              <text:p text:style-name="P4"><text:span text:style-name="T2">Use títulos claros e diretos.</text:span></text:p>
            </text:list-item>
            <text:list-item>
              <text:p text:style-name="P4"><text:span text:style-name="T2">Mantenha o conteúdo bem organizado.</text:span></text:p>
            </text:list-item>
            <text:list-item>
              <text:p text:style-name="P4"><text:span text:style-name="T2">Seja objetivo na fala.</text:span></text:p>
            </text:list-item>
            <text:list-item>
              <text:p text:style-name="P4"><text:span text:style-name="T2">Utilize gráficos e imagens quando necessário.</text:span></text:p>
            </text:list-item>
            <text:list-item>
              <text:p text:style-name="P4"><text:span text:style-name="T2">Adapte o tempo de apresentação ao formato sugerido.</text:span></text:p>
            </text:list-item>
          </text:list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5" draw:style-name="gr8" draw:text-style-name="P6" draw:layer="layout" svg:width="8.939cm" svg:height="8.94cm" svg:x="15.709cm" svg:y="2.607cm">
          <draw:image xlink:href="Pictures/10000000000004380000043877BFC3651FDFF5DA.png" xlink:type="simple" xlink:show="embed" xlink:actuate="onLoad" draw:mime-type="image/png">
            <text:p/>
          </draw:image>
        </draw:frame>
        <draw:custom-shape draw:name="Google Shape;69;p15" draw:style-name="gr9" draw:text-style-name="P2" draw:layer="layout" svg:width="8.939cm" svg:height="1.244cm" svg:x="15.709cm" svg:y="12.141cm">
          <text:p text:style-name="P1"><text:span text:style-name="T6">Para garantir uma boa leitura, utilize fontes claras e legíveis. Recomendamos a fonte </text:span><text:span text:style-name="T7">Inter</text:span><text:span text:style-name="T6">, disponível para download em </text:span><text:span text:style-name="T8"><text:a xlink:href="https://fonts.google.com/specimen/Inter" xlink:type="simple">fonts.google.com/specimen/Inter</text:a>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p3:notes" draw:style-name="gr2" draw:layer="layout" svg:width="16.932cm" svg:height="9.524cm" svg:x="1.059cm" svg:y="1.905cm" draw:page-number="3" presentation:class="page"/>
          <draw:frame draw:name="Google Shape;64;p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" presentation:presentation-page-layout-name="AL1T0">
        <draw:custom-shape draw:name="Google Shape;74;p16" draw:style-name="gr10" draw:text-style-name="P8" draw:layer="layout" svg:width="15.142cm" svg:height="1.372cm" svg:x="5.128cm" svg:y="5.771cm">
          <text:p text:style-name="P7"><text:span text:style-name="T1">Obrigada ou 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p4:notes" draw:style-name="gr2" draw:layer="layout" svg:width="16.932cm" svg:height="9.524cm" svg:x="1.059cm" svg:y="1.905cm" draw:page-number="4" presentation:class="page"/>
          <draw:frame draw:name="Google Shape;72;p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 style:font-pitch="variable"/>
    <style:font-face style:name="Inter ExtraBold" svg:font-family="'Inter ExtraBold'" style:font-pitch="variable"/>
    <style:font-face style:name="Inter ExtraBold1" svg:font-family="'Inter ExtraBold'"/>
    <style:font-face style:name="Inter Light" svg:font-family="'Inter Light'"/>
    <style:font-face style:name="Inter Light1" svg:font-family="'Inter Light'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EU2025_25_20-_25_20ID_25_20Visual_25_20templates_25_20apresentações-36" draw:display-name="EU2025%20-%20ID%20Visual%20templates%20apresentações-36" xlink:href="Pictures/1000000100000BB800000698164C8167574B1DA9.png" xlink:type="simple" xlink:show="embed" xlink:actuate="onLoad"/>
    <draw:fill-image draw:name="EU2025_25_20-_25_20ID_25_20Visual_25_20templates_25_20apresentações-37" draw:display-name="EU2025%20-%20ID%20Visual%20templates%20apresentações-37" xlink:href="Pictures/1000000100000BB800000698B238A397A1DCAF93.png" xlink:type="simple" xlink:show="embed" xlink:actuate="onLoad"/>
    <draw:fill-image draw:name="EU2025_25_20-_25_20ID_25_20Visual_25_20templates_25_20apresentações-39" draw:display-name="EU2025%20-%20ID%20Visual%20templates%20apresentações-39" xlink:href="Pictures/1000000100000BB8000006981881EE40D9212CE7.png" xlink:type="simple" xlink:show="embed" xlink:actuate="onLoad"/>
    <draw:fill-image draw:name="msFillBitmap_20_1" draw:display-name="msFillBitmap 1" xlink:href="Pictures/100000010000078000000438F245A529C6BD3B26.png" xlink:type="simple" xlink:show="embed" xlink:actuate="onLoad"/>
    <draw:fill-image draw:name="msFillBitmap_20_2" draw:display-name="msFillBitmap 2" xlink:href="Pictures/1000000100000780000004382183BBE62FCDCF2A.png" xlink:type="simple" xlink:show="embed" xlink:actuate="onLoad"/>
    <draw:fill-image draw:name="msFillBitmap_20_3" draw:display-name="msFillBitmap 3" xlink:href="Pictures/1000000100000780000004382183BBE62FCDCF2A.png" xlink:type="simple" xlink:show="embed" xlink:actuate="onLoad"/>
    <draw:fill-image draw:name="msFillBitmap_20_4" draw:display-name="msFillBitmap 4" xlink:href="Pictures/1000000100000780000004380C5CBCB8DC5082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2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0-20T15:12:19.642000000</dc:date>
    <meta:editing-duration>PT32M8S</meta:editing-duration>
    <meta:editing-cycles>1</meta:editing-cycles>
    <meta:document-statistic meta:object-count="36"/>
    <meta:generator>LibreOffice/7.6.2.1$Windows_X86_64 LibreOffice_project/56f7684011345957bbf33a7ee678afaf4d2ba333</meta:generator>
  </office:meta>
</office:document-meta>
</file>